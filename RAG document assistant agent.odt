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444000003AF7DD7E277.png" manifest:media-type="image/png"/>
  <manifest:file-entry manifest:full-path="Pictures/1000000100000442000003B8A7097194.png" manifest:media-type="image/png"/>
  <manifest:file-entry manifest:full-path="Pictures/100000010000047B000003B5E13840D2.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justify" style:justify-single-word="false"/>
      <style:text-properties fo:font-size="15pt" fo:font-weight="bold" officeooo:rsid="000faa77" officeooo:paragraph-rsid="000faa77" style:font-size-asian="15pt" style:font-weight-asian="bold" style:font-size-complex="15pt" style:font-weight-complex="bold"/>
    </style:style>
    <style:style style:name="P2" style:family="paragraph" style:parent-style-name="Standard">
      <style:paragraph-properties fo:text-align="justify" style:justify-single-word="false"/>
      <style:text-properties officeooo:rsid="000faa77" officeooo:paragraph-rsid="000faa77"/>
    </style:style>
    <style:style style:name="P3" style:family="paragraph" style:parent-style-name="Standard">
      <style:paragraph-properties fo:text-align="justify" style:justify-single-word="false"/>
      <style:text-properties officeooo:paragraph-rsid="001a89e6"/>
    </style:style>
    <style:style style:name="P4" style:family="paragraph" style:parent-style-name="Standard">
      <style:paragraph-properties fo:text-align="justify" style:justify-single-word="false"/>
      <style:text-properties officeooo:rsid="0011231a" officeooo:paragraph-rsid="0011231a"/>
    </style:style>
    <style:style style:name="P5" style:family="paragraph" style:parent-style-name="Standard">
      <style:paragraph-properties fo:text-align="justify" style:justify-single-word="false"/>
      <style:text-properties fo:font-weight="normal" officeooo:rsid="0012636c" officeooo:paragraph-rsid="0011231a" style:font-weight-asian="normal" style:font-weight-complex="normal"/>
    </style:style>
    <style:style style:name="P6" style:family="paragraph" style:parent-style-name="Standard">
      <style:paragraph-properties fo:text-align="justify" style:justify-single-word="false"/>
      <style:text-properties fo:font-weight="normal" officeooo:rsid="0012636c" officeooo:paragraph-rsid="0012636c" style:font-weight-asian="normal" style:font-weight-complex="normal"/>
    </style:style>
    <style:style style:name="P7" style:family="paragraph" style:parent-style-name="Standard">
      <style:paragraph-properties fo:text-align="justify" style:justify-single-word="false"/>
      <style:text-properties fo:font-weight="bold" officeooo:rsid="00138a50" officeooo:paragraph-rsid="00138a50" style:font-weight-asian="bold" style:font-weight-complex="bold"/>
    </style:style>
    <style:style style:name="P8" style:family="paragraph" style:parent-style-name="Standard">
      <style:paragraph-properties fo:text-align="justify" style:justify-single-word="false"/>
      <style:text-properties officeooo:rsid="00138a50" officeooo:paragraph-rsid="00138a50"/>
    </style:style>
    <style:style style:name="P9" style:family="paragraph" style:parent-style-name="Standard">
      <style:paragraph-properties fo:text-align="justify" style:justify-single-word="false"/>
      <style:text-properties fo:font-weight="bold" officeooo:rsid="001418c2" officeooo:paragraph-rsid="001418c2" style:font-weight-asian="bold" style:font-weight-complex="bold"/>
    </style:style>
    <style:style style:name="P10" style:family="paragraph" style:parent-style-name="Standard">
      <style:paragraph-properties fo:text-align="justify" style:justify-single-word="false"/>
      <style:text-properties officeooo:rsid="001418c2" officeooo:paragraph-rsid="001418c2"/>
    </style:style>
    <style:style style:name="P11" style:family="paragraph" style:parent-style-name="Standard">
      <style:paragraph-properties fo:text-align="justify" style:justify-single-word="false"/>
      <style:text-properties officeooo:rsid="001526bd" officeooo:paragraph-rsid="00138a50"/>
    </style:style>
    <style:style style:name="T1" style:family="text">
      <style:text-properties fo:font-weight="bold" style:font-weight-asian="bold" style:font-weight-complex="bold"/>
    </style:style>
    <style:style style:name="T2" style:family="text">
      <style:text-properties fo:font-weight="bold" officeooo:rsid="000faa77" style:font-weight-asian="bold" style:font-weight-complex="bold"/>
    </style:style>
    <style:style style:name="T3" style:family="text">
      <style:text-properties officeooo:rsid="000faa77"/>
    </style:style>
    <style:style style:name="T4" style:family="text">
      <style:text-properties fo:color="#c9211e" loext:opacity="100%" officeooo:rsid="000faa77"/>
    </style:style>
    <style:style style:name="T5" style:family="text">
      <style:text-properties fo:color="#000000" loext:opacity="100%" officeooo:rsid="0011231a"/>
    </style:style>
    <style:style style:name="T6" style:family="text">
      <style:text-properties fo:color="#000080" loext:opacity="100%" officeooo:rsid="0011231a"/>
    </style:style>
    <style:style style:name="T7" style:family="text">
      <style:text-properties fo:color="#000000" loext:opacity="100%" officeooo:rsid="000faa77"/>
    </style:style>
    <style:style style:name="T8" style:family="text">
      <style:text-properties officeooo:rsid="00138a50"/>
    </style:style>
    <style:style style:name="T9" style:family="text">
      <style:text-properties officeooo:rsid="001a89e6"/>
    </style:style>
    <style:style style:name="T10" style:family="text">
      <style:text-properties fo:font-weight="normal" officeooo:rsid="0012636c" style:font-weight-asian="normal" style:font-weight-complex="normal"/>
    </style:style>
    <style:style style:name="T11" style:family="text">
      <style:text-properties officeooo:rsid="001418c2"/>
    </style:style>
    <style:style style:name="T12" style:family="text">
      <style:text-properties fo:font-weight="normal" officeooo:rsid="001526bd"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G Document Assistant</text:p>
      <text:p text:style-name="P2"/>
      <text:p text:style-name="P2"><text:span text:style-name="T1">Goal:</text:span> Build, test and publish a no- code AI agent that answers employee IT/HR questions grounded on a knowledge base.</text:p>
      <text:p text:style-name="P2"/>
      <text:p text:style-name="P3"><text:span text:style-name="T2">Knowledge source :</text:span><text:span text:style-name="T3"> </text:span><text:span text:style-name="T4">Helpdesk_Knowledge_Base.md </text:span><text:span text:style-name="T5">(</text:span><text:a xlink:type="simple" xlink:href="https://github.com/harshalraut2002/rag-document-assistant.git" text:style-name="Internet_20_link" text:visited-style-name="Visited_20_Internet_20_Link"><text:span text:style-name="T6">https://github.com/harshalraut2002/rag-document-assistant.git</text:span></text:a><text:span text:style-name="T5">) </text:span><text:span text:style-name="T7">-</text:span><text:span text:style-name="T3">---- an ai generated fictional “ Nordic HealthTech AS “ FAQ, safe to demo. </text:span><text:span text:style-name="T8">Can use any fro your specific task, </text:span><text:span text:style-name="T9">b</text:span>ut the app works on any document you upload.<text:span text:style-name="T8">.</text:span></text:p>
      <text:p text:style-name="P2"/>
      <text:p text:style-name="P4"><text:span text:style-name="T1">Note: </text:span><text:span text:style-name="T10">Using RAG (Retrieval-Augmented Generation) project approach instead of Microsoft Copilot Studio, as it is free and shows deeper technical skill. Also due tot he unavailability of the microsoft work account.</text:span></text:p>
      <text:p text:style-name="P5"/>
      <text:p text:style-name="P6"><text:span text:style-name="T1">Retrieval- Augmented Generation (RAG):</text:span> Rather then sending a question straight to the language model, the app first splits the uploaded documents into small overlapping chunks, converts each into numeric embedding, and stores them. When you ask a question, it embeds the question too, finds the most semantically similar chunks by cosine similarity, and passes only those to the m<text:span text:style-name="T11">o</text:span>del as context.</text:p>
      <text:p text:style-name="P6"><text:s/></text:p>
      <text:p text:style-name="P6"><text:span text:style-name="T1">Why this model accurate:</text:span> It grounds every answer in your documents instead of the models memory – which keeps answers accurate, lets the system work on private or up to date material it was never trained on, and makes each answer traceable back to its source. It achieves this with no model retraining and runs entirely on a free LLM API, making it cheap, fast and trustworthy.</text:p>
      <text:p text:style-name="P6"/>
      <text:p text:style-name="P7">How to run the application live: <text:span text:style-name="T12">Full instructions in Github repository. </text:span></text:p>
      <text:p text:style-name="P8"/>
      <text:p text:style-name="P9">UI of working app:</text:p>
      <text:p text:style-name="P10"><draw:frame draw:style-name="fr1" draw:name="Image1" text:anchor-type="char" svg:x="0.3925in" svg:y="0.0744in" svg:width="2.7465in" svg:height="2.272in" draw:z-index="0"><draw:image xlink:href="Pictures/100000010000047B000003B5E13840D2.png" xlink:type="simple" xlink:show="embed" xlink:actuate="onLoad" draw:mime-type="image/png"/></draw:frame><draw:frame draw:style-name="fr1" draw:name="Image2" text:anchor-type="char" svg:x="3.6799in" svg:y="0.0756in" svg:width="2.639in" svg:height="2.2799in" draw:z-index="1"><draw:image xlink:href="Pictures/1000000100000444000003AF7DD7E277.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3" text:anchor-type="char" svg:x="2.028in" svg:y="0.0354in" svg:width="2.602in" svg:height="2.2728in" draw:z-index="2"><draw:image xlink:href="Pictures/1000000100000442000003B8A7097194.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24T10:27:01.316937000</meta:creation-date>
    <dc:date>2026-06-24T13:53:13.676595000</dc:date>
    <meta:editing-duration>PT1H4M28S</meta:editing-duration>
    <meta:editing-cycles>3</meta:editing-cycles>
    <meta:generator>LibreOffice/26.2.4.2$MacOSX_AARCH64 LibreOffice_project/0229ac93fcf0d7cbc6376066c6f35021cef002dc</meta:generator>
    <meta:document-statistic meta:table-count="0" meta:image-count="3" meta:object-count="0" meta:page-count="1" meta:paragraph-count="9" meta:word-count="231" meta:character-count="1484" meta:non-whitespace-character-count="1258"/>
  </office:meta>
</office:document-meta>
</file>